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to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4" style:family="table-cell" style:parent-style-name="Default" style:data-style-name="N2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5" style:family="table-cell" style:parent-style-name="Default" style:data-style-name="N36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6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17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2658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<text:s/>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6">
            <text:p>Aktuella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6667in" svg:width="0.96614in" svg:height="0.8541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7">
            <text:p>Betydande korta nettopositioner i aktier (blankning)</text:p>
          </table:table-cell>
          <table:table-cell table:style-name="ce8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17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 table:style-name="ce1"/>
        </table:table-row>
        <table:table-row table:style-name="ro5">
          <table:table-cell office:value-type="string" table:style-name="ce12">
            <text:p>Innehavare av positionen<text:s/></text:p>
            <text:p><text:span text:style-name="T1">(Position holder)</text:span></text:p>
          </table:table-cell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3">
            <text:p>ISIN</text:p>
          </table:table-cell>
          <table:table-cell office:value-type="string" table:style-name="ce14">
            <text:p>Position i procent<text:s/><text:span text:style-name="T1">(Position in per cent)</text:span></text:p>
          </table:table-cell>
          <table:table-cell office:value-type="string" table:style-name="ce15">
            <text:p>Datum för positionen<text:s/></text:p>
            <text:p><text:span text:style-name="T1">(Position date)</text:span></text:p>
          </table:table-cell>
          <table:table-cell office:value-type="string" table:style-name="ce15">
            <text:p>Kommentar<text:s/><text:span text:style-name="T2">(Comment)</text:span></text:p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12">
            <text:p xmlns:text="urn:oasis:names:tc:opendocument:xmlns:text:1.0">1,12</text:p>
          </table:table-cell>
          <table:table-cell xmlns:office="urn:oasis:names:tc:opendocument:xmlns:office:1.0" office:value-type="string" table:style-name="ce1">
            <text:p xmlns:text="urn:oasis:names:tc:opendocument:xmlns:text:1.0">2026-07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Sivers Semiconductors AB</text:p>
          </table:table-cell>
          <table:table-cell xmlns:office="urn:oasis:names:tc:opendocument:xmlns:office:1.0" office:value-type="string" table:style-name="ce1">
            <text:p xmlns:text="urn:oasis:names:tc:opendocument:xmlns:text:1.0">SE0003917798</text:p>
          </table:table-cell>
          <table:table-cell xmlns:office="urn:oasis:names:tc:opendocument:xmlns:office:1.0" office:value-type="float" table:style-name="ce1" office:value="1.15">
            <text:p xmlns:text="urn:oasis:names:tc:opendocument:xmlns:text:1.0">1,15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Apotea AB (publ)</text:p>
          </table:table-cell>
          <table:table-cell xmlns:office="urn:oasis:names:tc:opendocument:xmlns:office:1.0" office:value-type="string" table:style-name="ce1">
            <text:p xmlns:text="urn:oasis:names:tc:opendocument:xmlns:text:1.0">SE0023313762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KlaraBo Sverige AB</text:p>
          </table:table-cell>
          <table:table-cell xmlns:office="urn:oasis:names:tc:opendocument:xmlns:office:1.0" office:value-type="string" table:style-name="ce1">
            <text:p xmlns:text="urn:oasis:names:tc:opendocument:xmlns:text:1.0">SE001083228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Tobii AB</text:p>
          </table:table-cell>
          <table:table-cell xmlns:office="urn:oasis:names:tc:opendocument:xmlns:office:1.0" office:value-type="string" table:style-name="ce1">
            <text:p xmlns:text="urn:oasis:names:tc:opendocument:xmlns:text:1.0">SE0002591420</text:p>
          </table:table-cell>
          <table:table-cell xmlns:office="urn:oasis:names:tc:opendocument:xmlns:office:1.0" office:value-type="float" table:style-name="ce1" office:value="1.41">
            <text:p xmlns:text="urn:oasis:names:tc:opendocument:xmlns:text:1.0">1,4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HL Partners LLP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71886</text:p>
          </table:table-cell>
          <table:table-cell xmlns:office="urn:oasis:names:tc:opendocument:xmlns:office:1.0" office:value-type="float" table:style-name="ce1" office:value="1.08">
            <text:p xmlns:text="urn:oasis:names:tc:opendocument:xmlns:text:1.0">1,08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USSARD &amp; GAVAUDAN GESTION SAS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1.31">
            <text:p xmlns:text="urn:oasis:names:tc:opendocument:xmlns:text:1.0">1,3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Vicore Pharma Holding AB</text:p>
          </table:table-cell>
          <table:table-cell xmlns:office="urn:oasis:names:tc:opendocument:xmlns:office:1.0" office:value-type="string" table:style-name="ce1">
            <text:p xmlns:text="urn:oasis:names:tc:opendocument:xmlns:text:1.0">SE0007577895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tudsvik AB</text:p>
          </table:table-cell>
          <table:table-cell xmlns:office="urn:oasis:names:tc:opendocument:xmlns:office:1.0" office:value-type="string" table:style-name="ce1">
            <text:p xmlns:text="urn:oasis:names:tc:opendocument:xmlns:text:1.0">SE000065323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Ilex Capital Partners (UK) LLP</text:p>
          </table:table-cell>
          <table:table-cell xmlns:office="urn:oasis:names:tc:opendocument:xmlns:office:1.0" office:value-type="string" table:style-name="ce1">
            <text:p xmlns:text="urn:oasis:names:tc:opendocument:xmlns:text:1.0">Essity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922164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35485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Röko AB (publ)</text:p>
          </table:table-cell>
          <table:table-cell xmlns:office="urn:oasis:names:tc:opendocument:xmlns:office:1.0" office:value-type="string" table:style-name="ce1">
            <text:p xmlns:text="urn:oasis:names:tc:opendocument:xmlns:text:1.0">SE0023950795</text:p>
          </table:table-cell>
          <table:table-cell xmlns:office="urn:oasis:names:tc:opendocument:xmlns:office:1.0" office:value-type="float" table:style-name="ce1" office:value="1.3">
            <text:p xmlns:text="urn:oasis:names:tc:opendocument:xmlns:text:1.0">1,3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enterBook Partners 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7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Numeric Investors LLC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volder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45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Inwido AB (publ)</text:p>
          </table:table-cell>
          <table:table-cell xmlns:office="urn:oasis:names:tc:opendocument:xmlns:office:1.0" office:value-type="string" table:style-name="ce1">
            <text:p xmlns:text="urn:oasis:names:tc:opendocument:xmlns:text:1.0">SE0006220018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chant MC Ltd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94">
            <text:p xmlns:text="urn:oasis:names:tc:opendocument:xmlns:text:1.0">0,94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chonfeld Strategic Advisors (DIFC) Limite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Sivers Semiconductors AB</text:p>
          </table:table-cell>
          <table:table-cell xmlns:office="urn:oasis:names:tc:opendocument:xmlns:office:1.0" office:value-type="string" table:style-name="ce1">
            <text:p xmlns:text="urn:oasis:names:tc:opendocument:xmlns:text:1.0">SE000391779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Fagerhult Group AB</text:p>
          </table:table-cell>
          <table:table-cell xmlns:office="urn:oasis:names:tc:opendocument:xmlns:office:1.0" office:value-type="string" table:style-name="ce1">
            <text:p xmlns:text="urn:oasis:names:tc:opendocument:xmlns:text:1.0">SE0010048884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35485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Boozt AB</text:p>
          </table:table-cell>
          <table:table-cell xmlns:office="urn:oasis:names:tc:opendocument:xmlns:office:1.0" office:value-type="string" table:style-name="ce1">
            <text:p xmlns:text="urn:oasis:names:tc:opendocument:xmlns:text:1.0">SE0009888738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Axfood AB</text:p>
          </table:table-cell>
          <table:table-cell xmlns:office="urn:oasis:names:tc:opendocument:xmlns:office:1.0" office:value-type="string" table:style-name="ce1">
            <text:p xmlns:text="urn:oasis:names:tc:opendocument:xmlns:text:1.0">SE000699377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amlyn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3.69">
            <text:p xmlns:text="urn:oasis:names:tc:opendocument:xmlns:text:1.0">3,6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7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268279</text:p>
          </table:table-cell>
          <table:table-cell xmlns:office="urn:oasis:names:tc:opendocument:xmlns:office:1.0" office:value-type="float" table:style-name="ce1" office:value="1.53">
            <text:p xmlns:text="urn:oasis:names:tc:opendocument:xmlns:text:1.0">1,53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39">
            <text:p xmlns:text="urn:oasis:names:tc:opendocument:xmlns:text:1.0">1,39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Karnov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32371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Dicot Pharma AB</text:p>
          </table:table-cell>
          <table:table-cell xmlns:office="urn:oasis:names:tc:opendocument:xmlns:office:1.0" office:value-type="string" table:style-name="ce1">
            <text:p xmlns:text="urn:oasis:names:tc:opendocument:xmlns:text:1.0">SE0011178458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SynAct Pharma AB</text:p>
          </table:table-cell>
          <table:table-cell xmlns:office="urn:oasis:names:tc:opendocument:xmlns:office:1.0" office:value-type="string" table:style-name="ce1">
            <text:p xmlns:text="urn:oasis:names:tc:opendocument:xmlns:text:1.0">SE0008241491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1.09">
            <text:p xmlns:text="urn:oasis:names:tc:opendocument:xmlns:text:1.0">1,09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Gruvaktiebolaget Viscaria</text:p>
          </table:table-cell>
          <table:table-cell xmlns:office="urn:oasis:names:tc:opendocument:xmlns:office:1.0" office:value-type="string" table:style-name="ce1">
            <text:p xmlns:text="urn:oasis:names:tc:opendocument:xmlns:text:1.0">SE002114816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Coor Service Managemen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7158829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Clavister AB</text:p>
          </table:table-cell>
          <table:table-cell xmlns:office="urn:oasis:names:tc:opendocument:xmlns:office:1.0" office:value-type="string" table:style-name="ce1">
            <text:p xmlns:text="urn:oasis:names:tc:opendocument:xmlns:text:1.0">SE000530855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Nobia AB</text:p>
          </table:table-cell>
          <table:table-cell xmlns:office="urn:oasis:names:tc:opendocument:xmlns:office:1.0" office:value-type="string" table:style-name="ce1">
            <text:p xmlns:text="urn:oasis:names:tc:opendocument:xmlns:text:1.0">SE002890013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Lifco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201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Ascelia Pharma AB</text:p>
          </table:table-cell>
          <table:table-cell xmlns:office="urn:oasis:names:tc:opendocument:xmlns:office:1.0" office:value-type="string" table:style-name="ce1">
            <text:p xmlns:text="urn:oasis:names:tc:opendocument:xmlns:text:1.0">SE0010573113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inton Capital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346135</text:p>
          </table:table-cell>
          <table:table-cell xmlns:office="urn:oasis:names:tc:opendocument:xmlns:office:1.0" office:value-type="float" table:style-name="ce1" office:value="1.39">
            <text:p xmlns:text="urn:oasis:names:tc:opendocument:xmlns:text:1.0">1,39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BioArctic AB</text:p>
          </table:table-cell>
          <table:table-cell xmlns:office="urn:oasis:names:tc:opendocument:xmlns:office:1.0" office:value-type="string" table:style-name="ce1">
            <text:p xmlns:text="urn:oasis:names:tc:opendocument:xmlns:text:1.0">SE0010323311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Camurus AB</text:p>
          </table:table-cell>
          <table:table-cell xmlns:office="urn:oasis:names:tc:opendocument:xmlns:office:1.0" office:value-type="string" table:style-name="ce1">
            <text:p xmlns:text="urn:oasis:names:tc:opendocument:xmlns:text:1.0">SE000769285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6-07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tento Partners LLP</text:p>
          </table:table-cell>
          <table:table-cell xmlns:office="urn:oasis:names:tc:opendocument:xmlns:office:1.0" office:value-type="string" table:style-name="ce1">
            <text:p xmlns:text="urn:oasis:names:tc:opendocument:xmlns:text:1.0">INVISIO AB</text:p>
          </table:table-cell>
          <table:table-cell xmlns:office="urn:oasis:names:tc:opendocument:xmlns:office:1.0" office:value-type="string" table:style-name="ce1">
            <text:p xmlns:text="urn:oasis:names:tc:opendocument:xmlns:text:1.0">SE0001200015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tento Partners LLP</text:p>
          </table:table-cell>
          <table:table-cell xmlns:office="urn:oasis:names:tc:opendocument:xmlns:office:1.0" office:value-type="string" table:style-name="ce1">
            <text:p xmlns:text="urn:oasis:names:tc:opendocument:xmlns:text:1.0">AAK AB (publ)</text:p>
          </table:table-cell>
          <table:table-cell xmlns:office="urn:oasis:names:tc:opendocument:xmlns:office:1.0" office:value-type="string" table:style-name="ce1">
            <text:p xmlns:text="urn:oasis:names:tc:opendocument:xmlns:text:1.0">SE001133770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20050417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1.09">
            <text:p xmlns:text="urn:oasis:names:tc:opendocument:xmlns:text:1.0">1,0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Oncopeptides AB</text:p>
          </table:table-cell>
          <table:table-cell xmlns:office="urn:oasis:names:tc:opendocument:xmlns:office:1.0" office:value-type="string" table:style-name="ce1">
            <text:p xmlns:text="urn:oasis:names:tc:opendocument:xmlns:text:1.0">SE0009414576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Betsson AB</text:p>
          </table:table-cell>
          <table:table-cell xmlns:office="urn:oasis:names:tc:opendocument:xmlns:office:1.0" office:value-type="string" table:style-name="ce1">
            <text:p xmlns:text="urn:oasis:names:tc:opendocument:xmlns:text:1.0">SE0022726485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1.85">
            <text:p xmlns:text="urn:oasis:names:tc:opendocument:xmlns:text:1.0">1,85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Oncopeptides AB</text:p>
          </table:table-cell>
          <table:table-cell xmlns:office="urn:oasis:names:tc:opendocument:xmlns:office:1.0" office:value-type="string" table:style-name="ce1">
            <text:p xmlns:text="urn:oasis:names:tc:opendocument:xmlns:text:1.0">SE0009414576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Immunovia AB (publ)</text:p>
          </table:table-cell>
          <table:table-cell xmlns:office="urn:oasis:names:tc:opendocument:xmlns:office:1.0" office:value-type="string" table:style-name="ce1">
            <text:p xmlns:text="urn:oasis:names:tc:opendocument:xmlns:text:1.0">SE000609199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Evolution AB (publ)</text:p>
          </table:table-cell>
          <table:table-cell xmlns:office="urn:oasis:names:tc:opendocument:xmlns:office:1.0" office:value-type="string" table:style-name="ce1">
            <text:p xmlns:text="urn:oasis:names:tc:opendocument:xmlns:text:1.0">SE0012673267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MilDef Group AB</text:p>
          </table:table-cell>
          <table:table-cell xmlns:office="urn:oasis:names:tc:opendocument:xmlns:office:1.0" office:value-type="string" table:style-name="ce1">
            <text:p xmlns:text="urn:oasis:names:tc:opendocument:xmlns:text:1.0">SE0016074249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Yubico AB</text:p>
          </table:table-cell>
          <table:table-cell xmlns:office="urn:oasis:names:tc:opendocument:xmlns:office:1.0" office:value-type="string" table:style-name="ce1">
            <text:p xmlns:text="urn:oasis:names:tc:opendocument:xmlns:text:1.0">SE0015657788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6-07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Financial Management Inc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KAMBI GROUP PLC</text:p>
          </table:table-cell>
          <table:table-cell xmlns:office="urn:oasis:names:tc:opendocument:xmlns:office:1.0" office:value-type="string" table:style-name="ce1">
            <text:p xmlns:text="urn:oasis:names:tc:opendocument:xmlns:text:1.0">MT0000780107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Advisors LLC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IL Investments International</text:p>
          </table:table-cell>
          <table:table-cell xmlns:office="urn:oasis:names:tc:opendocument:xmlns:office:1.0" office:value-type="string" table:style-name="ce1">
            <text:p xmlns:text="urn:oasis:names:tc:opendocument:xmlns:text:1.0">Röko AB (publ)</text:p>
          </table:table-cell>
          <table:table-cell xmlns:office="urn:oasis:names:tc:opendocument:xmlns:office:1.0" office:value-type="string" table:style-name="ce1">
            <text:p xmlns:text="urn:oasis:names:tc:opendocument:xmlns:text:1.0">SE0023950795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1.1">
            <text:p xmlns:text="urn:oasis:names:tc:opendocument:xmlns:text:1.0">1,1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inton Capital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stlebar Capital LLP</text:p>
          </table:table-cell>
          <table:table-cell xmlns:office="urn:oasis:names:tc:opendocument:xmlns:office:1.0" office:value-type="string" table:style-name="ce1">
            <text:p xmlns:text="urn:oasis:names:tc:opendocument:xmlns:text:1.0">Ambea AB ( publ )</text:p>
          </table:table-cell>
          <table:table-cell xmlns:office="urn:oasis:names:tc:opendocument:xmlns:office:1.0" office:value-type="string" table:style-name="ce1">
            <text:p xmlns:text="urn:oasis:names:tc:opendocument:xmlns:text:1.0">SE0009663826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GES CAPITAL L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Numeric Investors LLC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Alligator Bioscience AB</text:p>
          </table:table-cell>
          <table:table-cell xmlns:office="urn:oasis:names:tc:opendocument:xmlns:office:1.0" office:value-type="string" table:style-name="ce1">
            <text:p xmlns:text="urn:oasis:names:tc:opendocument:xmlns:text:1.0">SE0024173637</text:p>
          </table:table-cell>
          <table:table-cell xmlns:office="urn:oasis:names:tc:opendocument:xmlns:office:1.0" office:value-type="float" table:style-name="ce1" office:value="2.08">
            <text:p xmlns:text="urn:oasis:names:tc:opendocument:xmlns:text:1.0">2,08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Yiheng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1.54">
            <text:p xmlns:text="urn:oasis:names:tc:opendocument:xmlns:text:1.0">1,54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Lifco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201</text:p>
          </table:table-cell>
          <table:table-cell xmlns:office="urn:oasis:names:tc:opendocument:xmlns:office:1.0" office:value-type="float" table:style-name="ce1" office:value="1.09">
            <text:p xmlns:text="urn:oasis:names:tc:opendocument:xmlns:text:1.0">1,09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AAK AB (publ)</text:p>
          </table:table-cell>
          <table:table-cell xmlns:office="urn:oasis:names:tc:opendocument:xmlns:office:1.0" office:value-type="string" table:style-name="ce1">
            <text:p xmlns:text="urn:oasis:names:tc:opendocument:xmlns:text:1.0">SE0011337708</text:p>
          </table:table-cell>
          <table:table-cell xmlns:office="urn:oasis:names:tc:opendocument:xmlns:office:1.0" office:value-type="float" table:style-name="ce1" office:value="1.18">
            <text:p xmlns:text="urn:oasis:names:tc:opendocument:xmlns:text:1.0">1,18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6-07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ibus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SE0010832204</text:p>
          </table:table-cell>
          <table:table-cell xmlns:office="urn:oasis:names:tc:opendocument:xmlns:office:1.0" office:value-type="float" table:style-name="ce1" office:value="1.77">
            <text:p xmlns:text="urn:oasis:names:tc:opendocument:xmlns:text:1.0">1,77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39">
            <text:p xmlns:text="urn:oasis:names:tc:opendocument:xmlns:text:1.0">1,39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Ilex Capital Partners (UK) LLP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GES CAPITAL LLP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2005041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G5 Entertainment AB (publ)</text:p>
          </table:table-cell>
          <table:table-cell xmlns:office="urn:oasis:names:tc:opendocument:xmlns:office:1.0" office:value-type="string" table:style-name="ce1">
            <text:p xmlns:text="urn:oasis:names:tc:opendocument:xmlns:text:1.0">SE0001824004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346135</text:p>
          </table:table-cell>
          <table:table-cell xmlns:office="urn:oasis:names:tc:opendocument:xmlns:office:1.0" office:value-type="float" table:style-name="ce1" office:value="1.49">
            <text:p xmlns:text="urn:oasis:names:tc:opendocument:xmlns:text:1.0">1,49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MilDef Group AB</text:p>
          </table:table-cell>
          <table:table-cell xmlns:office="urn:oasis:names:tc:opendocument:xmlns:office:1.0" office:value-type="string" table:style-name="ce1">
            <text:p xmlns:text="urn:oasis:names:tc:opendocument:xmlns:text:1.0">SE0016074249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21628898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6-07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avidson Kempner European Partners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1.4">
            <text:p xmlns:text="urn:oasis:names:tc:opendocument:xmlns:text:1.0">1,4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alyasny Asset Management, L.P.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Nordnet AB (publ)</text:p>
          </table:table-cell>
          <table:table-cell xmlns:office="urn:oasis:names:tc:opendocument:xmlns:office:1.0" office:value-type="string" table:style-name="ce1">
            <text:p xmlns:text="urn:oasis:names:tc:opendocument:xmlns:text:1.0">SE001519206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Investment Management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Securities (Europe) Limited</text:p>
          </table:table-cell>
          <table:table-cell xmlns:office="urn:oasis:names:tc:opendocument:xmlns:office:1.0" office:value-type="string" table:style-name="ce1">
            <text:p xmlns:text="urn:oasis:names:tc:opendocument:xmlns:text:1.0">Scandinavian Enviro Systems AB</text:p>
          </table:table-cell>
          <table:table-cell xmlns:office="urn:oasis:names:tc:opendocument:xmlns:office:1.0" office:value-type="string" table:style-name="ce1">
            <text:p xmlns:text="urn:oasis:names:tc:opendocument:xmlns:text:1.0">SE0005877560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Addnode Group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1788576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AAK AB (publ)</text:p>
          </table:table-cell>
          <table:table-cell xmlns:office="urn:oasis:names:tc:opendocument:xmlns:office:1.0" office:value-type="string" table:style-name="ce1">
            <text:p xmlns:text="urn:oasis:names:tc:opendocument:xmlns:text:1.0">SE0011337708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Inwido AB (publ)</text:p>
          </table:table-cell>
          <table:table-cell xmlns:office="urn:oasis:names:tc:opendocument:xmlns:office:1.0" office:value-type="string" table:style-name="ce1">
            <text:p xmlns:text="urn:oasis:names:tc:opendocument:xmlns:text:1.0">SE0006220018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UEVOURA FUN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1.09">
            <text:p xmlns:text="urn:oasis:names:tc:opendocument:xmlns:text:1.0">1,09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xodusPoint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CellaVision AB</text:p>
          </table:table-cell>
          <table:table-cell xmlns:office="urn:oasis:names:tc:opendocument:xmlns:office:1.0" office:value-type="string" table:style-name="ce1">
            <text:p xmlns:text="urn:oasis:names:tc:opendocument:xmlns:text:1.0">SE000068348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igh Ground Investment Management LLP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 Creek Capital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ISSE DE DEPOT ET PLACEMENT DU QUEBE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SE000010627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quarepoint Ops LLC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Europe Limited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Knowit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0421273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Cibus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SE0010832204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Arjo AB (publ)</text:p>
          </table:table-cell>
          <table:table-cell xmlns:office="urn:oasis:names:tc:opendocument:xmlns:office:1.0" office:value-type="string" table:style-name="ce1">
            <text:p xmlns:text="urn:oasis:names:tc:opendocument:xmlns:text:1.0">SE0010468116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1.55">
            <text:p xmlns:text="urn:oasis:names:tc:opendocument:xmlns:text:1.0">1,55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INVISIO AB</text:p>
          </table:table-cell>
          <table:table-cell xmlns:office="urn:oasis:names:tc:opendocument:xmlns:office:1.0" office:value-type="string" table:style-name="ce1">
            <text:p xmlns:text="urn:oasis:names:tc:opendocument:xmlns:text:1.0">SE000120001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engcon AB</text:p>
          </table:table-cell>
          <table:table-cell xmlns:office="urn:oasis:names:tc:opendocument:xmlns:office:1.0" office:value-type="string" table:style-name="ce1">
            <text:p xmlns:text="urn:oasis:names:tc:opendocument:xmlns:text:1.0">SE0017769847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Billerud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086299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MilDef Group AB</text:p>
          </table:table-cell>
          <table:table-cell xmlns:office="urn:oasis:names:tc:opendocument:xmlns:office:1.0" office:value-type="string" table:style-name="ce1">
            <text:p xmlns:text="urn:oasis:names:tc:opendocument:xmlns:text:1.0">SE0016074249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Europe (London) LLP</text:p>
          </table:table-cell>
          <table:table-cell xmlns:office="urn:oasis:names:tc:opendocument:xmlns:office:1.0" office:value-type="string" table:style-name="ce1">
            <text:p xmlns:text="urn:oasis:names:tc:opendocument:xmlns:text:1.0">Wallenstam AB</text:p>
          </table:table-cell>
          <table:table-cell xmlns:office="urn:oasis:names:tc:opendocument:xmlns:office:1.0" office:value-type="string" table:style-name="ce1">
            <text:p xmlns:text="urn:oasis:names:tc:opendocument:xmlns:text:1.0">SE0017780133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Tobii AB</text:p>
          </table:table-cell>
          <table:table-cell xmlns:office="urn:oasis:names:tc:opendocument:xmlns:office:1.0" office:value-type="string" table:style-name="ce1">
            <text:p xmlns:text="urn:oasis:names:tc:opendocument:xmlns:text:1.0">SE0002591420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G Partners 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INVISIO AB</text:p>
          </table:table-cell>
          <table:table-cell xmlns:office="urn:oasis:names:tc:opendocument:xmlns:office:1.0" office:value-type="string" table:style-name="ce1">
            <text:p xmlns:text="urn:oasis:names:tc:opendocument:xmlns:text:1.0">SE000120001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Catena AB</text:p>
          </table:table-cell>
          <table:table-cell xmlns:office="urn:oasis:names:tc:opendocument:xmlns:office:1.0" office:value-type="string" table:style-name="ce1">
            <text:p xmlns:text="urn:oasis:names:tc:opendocument:xmlns:text:1.0">SE000166470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Advisors LL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1.18">
            <text:p xmlns:text="urn:oasis:names:tc:opendocument:xmlns:text:1.0">1,18</text:p>
          </table:table-cell>
          <table:table-cell xmlns:office="urn:oasis:names:tc:opendocument:xmlns:office:1.0" office:value-type="string" table:style-name="ce1">
            <text:p xmlns:text="urn:oasis:names:tc:opendocument:xmlns:text:1.0">2026-06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tento Partners LLP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3.61">
            <text:p xmlns:text="urn:oasis:names:tc:opendocument:xmlns:text:1.0">3,61</text:p>
          </table:table-cell>
          <table:table-cell xmlns:office="urn:oasis:names:tc:opendocument:xmlns:office:1.0" office:value-type="string" table:style-name="ce1">
            <text:p xmlns:text="urn:oasis:names:tc:opendocument:xmlns:text:1.0">2026-06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6-06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SE0007439443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Investment Management</text:p>
          </table:table-cell>
          <table:table-cell xmlns:office="urn:oasis:names:tc:opendocument:xmlns:office:1.0" office:value-type="string" table:style-name="ce1">
            <text:p xmlns:text="urn:oasis:names:tc:opendocument:xmlns:text:1.0">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SE0007439443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inden Advisors LP</text:p>
          </table:table-cell>
          <table:table-cell xmlns:office="urn:oasis:names:tc:opendocument:xmlns:office:1.0" office:value-type="string" table:style-name="ce1">
            <text:p xmlns:text="urn:oasis:names:tc:opendocument:xmlns:text:1.0">ALVOTECH</text:p>
          </table:table-cell>
          <table:table-cell xmlns:office="urn:oasis:names:tc:opendocument:xmlns:office:1.0" office:value-type="string" table:style-name="ce1">
            <text:p xmlns:text="urn:oasis:names:tc:opendocument:xmlns:text:1.0">SE0025011463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wedencare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88167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3.18">
            <text:p xmlns:text="urn:oasis:names:tc:opendocument:xmlns:text:1.0">3,18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SSAB AB</text:p>
          </table:table-cell>
          <table:table-cell xmlns:office="urn:oasis:names:tc:opendocument:xmlns:office:1.0" office:value-type="string" table:style-name="ce1">
            <text:p xmlns:text="urn:oasis:names:tc:opendocument:xmlns:text:1.0">SE000012066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GES CAPITAL LLP</text:p>
          </table:table-cell>
          <table:table-cell xmlns:office="urn:oasis:names:tc:opendocument:xmlns:office:1.0" office:value-type="string" table:style-name="ce1">
            <text:p xmlns:text="urn:oasis:names:tc:opendocument:xmlns:text:1.0">Yubico AB</text:p>
          </table:table-cell>
          <table:table-cell xmlns:office="urn:oasis:names:tc:opendocument:xmlns:office:1.0" office:value-type="string" table:style-name="ce1">
            <text:p xmlns:text="urn:oasis:names:tc:opendocument:xmlns:text:1.0">SE0015657788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35485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Inwido AB (publ)</text:p>
          </table:table-cell>
          <table:table-cell xmlns:office="urn:oasis:names:tc:opendocument:xmlns:office:1.0" office:value-type="string" table:style-name="ce1">
            <text:p xmlns:text="urn:oasis:names:tc:opendocument:xmlns:text:1.0">SE0006220018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6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SE0007439443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Addnode Group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17885767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Röko AB (publ)</text:p>
          </table:table-cell>
          <table:table-cell xmlns:office="urn:oasis:names:tc:opendocument:xmlns:office:1.0" office:value-type="string" table:style-name="ce1">
            <text:p xmlns:text="urn:oasis:names:tc:opendocument:xmlns:text:1.0">SE0023950795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Apotea AB (publ)</text:p>
          </table:table-cell>
          <table:table-cell xmlns:office="urn:oasis:names:tc:opendocument:xmlns:office:1.0" office:value-type="string" table:style-name="ce1">
            <text:p xmlns:text="urn:oasis:names:tc:opendocument:xmlns:text:1.0">SE0023313762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6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Camurus AB</text:p>
          </table:table-cell>
          <table:table-cell xmlns:office="urn:oasis:names:tc:opendocument:xmlns:office:1.0" office:value-type="string" table:style-name="ce1">
            <text:p xmlns:text="urn:oasis:names:tc:opendocument:xmlns:text:1.0">SE0007692850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346135</text:p>
          </table:table-cell>
          <table:table-cell xmlns:office="urn:oasis:names:tc:opendocument:xmlns:office:1.0" office:value-type="float" table:style-name="ce1" office:value="1.4">
            <text:p xmlns:text="urn:oasis:names:tc:opendocument:xmlns:text:1.0">1,4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Lime Technolog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1187019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Rejler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2367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bdi Moazami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6-06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Holmen Aktiebolag</text:p>
          </table:table-cell>
          <table:table-cell xmlns:office="urn:oasis:names:tc:opendocument:xmlns:office:1.0" office:value-type="string" table:style-name="ce1">
            <text:p xmlns:text="urn:oasis:names:tc:opendocument:xmlns:text:1.0">SE0011090018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67">
            <text:p xmlns:text="urn:oasis:names:tc:opendocument:xmlns:text:1.0">1,67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Camurus AB</text:p>
          </table:table-cell>
          <table:table-cell xmlns:office="urn:oasis:names:tc:opendocument:xmlns:office:1.0" office:value-type="string" table:style-name="ce1">
            <text:p xmlns:text="urn:oasis:names:tc:opendocument:xmlns:text:1.0">SE000769285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BioGaia AB</text:p>
          </table:table-cell>
          <table:table-cell xmlns:office="urn:oasis:names:tc:opendocument:xmlns:office:1.0" office:value-type="string" table:style-name="ce1">
            <text:p xmlns:text="urn:oasis:names:tc:opendocument:xmlns:text:1.0">SE0017769995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perture Investors UK Ltd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ooklands Fund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Hufvudstaden AB</text:p>
          </table:table-cell>
          <table:table-cell xmlns:office="urn:oasis:names:tc:opendocument:xmlns:office:1.0" office:value-type="string" table:style-name="ce1">
            <text:p xmlns:text="urn:oasis:names:tc:opendocument:xmlns:text:1.0">SE0000170383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6-06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Modern Times Group MTG AB</text:p>
          </table:table-cell>
          <table:table-cell xmlns:office="urn:oasis:names:tc:opendocument:xmlns:office:1.0" office:value-type="string" table:style-name="ce1">
            <text:p xmlns:text="urn:oasis:names:tc:opendocument:xmlns:text:1.0">SE0018012494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6-06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ilber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6278154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6-06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1.04">
            <text:p xmlns:text="urn:oasis:names:tc:opendocument:xmlns:text:1.0">1,04</text:p>
          </table:table-cell>
          <table:table-cell xmlns:office="urn:oasis:names:tc:opendocument:xmlns:office:1.0" office:value-type="string" table:style-name="ce1">
            <text:p xmlns:text="urn:oasis:names:tc:opendocument:xmlns:text:1.0">2026-06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UEVOURA FUND</text:p>
          </table:table-cell>
          <table:table-cell xmlns:office="urn:oasis:names:tc:opendocument:xmlns:office:1.0" office:value-type="string" table:style-name="ce1">
            <text:p xmlns:text="urn:oasis:names:tc:opendocument:xmlns:text:1.0">Precise Biometrics AB</text:p>
          </table:table-cell>
          <table:table-cell xmlns:office="urn:oasis:names:tc:opendocument:xmlns:office:1.0" office:value-type="string" table:style-name="ce1">
            <text:p xmlns:text="urn:oasis:names:tc:opendocument:xmlns:text:1.0">SE0018013849</text:p>
          </table:table-cell>
          <table:table-cell xmlns:office="urn:oasis:names:tc:opendocument:xmlns:office:1.0" office:value-type="float" table:style-name="ce1" office:value="1.01">
            <text:p xmlns:text="urn:oasis:names:tc:opendocument:xmlns:text:1.0">1,01</text:p>
          </table:table-cell>
          <table:table-cell xmlns:office="urn:oasis:names:tc:opendocument:xmlns:office:1.0" office:value-type="string" table:style-name="ce1">
            <text:p xmlns:text="urn:oasis:names:tc:opendocument:xmlns:text:1.0">2026-06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Verisure plc</text:p>
          </table:table-cell>
          <table:table-cell xmlns:office="urn:oasis:names:tc:opendocument:xmlns:office:1.0" office:value-type="string" table:style-name="ce1">
            <text:p xmlns:text="urn:oasis:names:tc:opendocument:xmlns:text:1.0">GB00BVMN155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6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Nobia AB</text:p>
          </table:table-cell>
          <table:table-cell xmlns:office="urn:oasis:names:tc:opendocument:xmlns:office:1.0" office:value-type="string" table:style-name="ce1">
            <text:p xmlns:text="urn:oasis:names:tc:opendocument:xmlns:text:1.0">SE002890013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MilDef Group AB</text:p>
          </table:table-cell>
          <table:table-cell xmlns:office="urn:oasis:names:tc:opendocument:xmlns:office:1.0" office:value-type="string" table:style-name="ce1">
            <text:p xmlns:text="urn:oasis:names:tc:opendocument:xmlns:text:1.0">SE0016074249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6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6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6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Haypp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6829469</text:p>
          </table:table-cell>
          <table:table-cell xmlns:office="urn:oasis:names:tc:opendocument:xmlns:office:1.0" office:value-type="float" table:style-name="ce1" office:value="1.26">
            <text:p xmlns:text="urn:oasis:names:tc:opendocument:xmlns:text:1.0">1,26</text:p>
          </table:table-cell>
          <table:table-cell xmlns:office="urn:oasis:names:tc:opendocument:xmlns:office:1.0" office:value-type="string" table:style-name="ce1">
            <text:p xmlns:text="urn:oasis:names:tc:opendocument:xmlns:text:1.0">2026-06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Investment Management</text:p>
          </table:table-cell>
          <table:table-cell xmlns:office="urn:oasis:names:tc:opendocument:xmlns:office:1.0" office:value-type="string" table:style-name="ce1">
            <text:p xmlns:text="urn:oasis:names:tc:opendocument:xmlns:text:1.0">Haypp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6829469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6-06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Lime Technolog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11870195</text:p>
          </table:table-cell>
          <table:table-cell xmlns:office="urn:oasis:names:tc:opendocument:xmlns:office:1.0" office:value-type="float" table:style-name="ce1" office:value="1.39">
            <text:p xmlns:text="urn:oasis:names:tc:opendocument:xmlns:text:1.0">1,39</text:p>
          </table:table-cell>
          <table:table-cell xmlns:office="urn:oasis:names:tc:opendocument:xmlns:office:1.0" office:value-type="string" table:style-name="ce1">
            <text:p xmlns:text="urn:oasis:names:tc:opendocument:xmlns:text:1.0">2026-06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2.04">
            <text:p xmlns:text="urn:oasis:names:tc:opendocument:xmlns:text:1.0">2,04</text:p>
          </table:table-cell>
          <table:table-cell xmlns:office="urn:oasis:names:tc:opendocument:xmlns:office:1.0" office:value-type="string" table:style-name="ce1">
            <text:p xmlns:text="urn:oasis:names:tc:opendocument:xmlns:text:1.0">2026-06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Bravida Holding AB</text:p>
          </table:table-cell>
          <table:table-cell xmlns:office="urn:oasis:names:tc:opendocument:xmlns:office:1.0" office:value-type="string" table:style-name="ce1">
            <text:p xmlns:text="urn:oasis:names:tc:opendocument:xmlns:text:1.0">SE0007491303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35485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6-06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Getinge AB (publ)</text:p>
          </table:table-cell>
          <table:table-cell xmlns:office="urn:oasis:names:tc:opendocument:xmlns:office:1.0" office:value-type="string" table:style-name="ce1">
            <text:p xmlns:text="urn:oasis:names:tc:opendocument:xmlns:text:1.0">SE000020262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oldman Sachs Asset International</text:p>
          </table:table-cell>
          <table:table-cell xmlns:office="urn:oasis:names:tc:opendocument:xmlns:office:1.0" office:value-type="string" table:style-name="ce1">
            <text:p xmlns:text="urn:oasis:names:tc:opendocument:xmlns:text:1.0">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34613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6-06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Alleima AB</text:p>
          </table:table-cell>
          <table:table-cell xmlns:office="urn:oasis:names:tc:opendocument:xmlns:office:1.0" office:value-type="string" table:style-name="ce1">
            <text:p xmlns:text="urn:oasis:names:tc:opendocument:xmlns:text:1.0">SE0017615644</text:p>
          </table:table-cell>
          <table:table-cell xmlns:office="urn:oasis:names:tc:opendocument:xmlns:office:1.0" office:value-type="float" table:style-name="ce1" office:value="1.1">
            <text:p xmlns:text="urn:oasis:names:tc:opendocument:xmlns:text:1.0">1,1</text:p>
          </table:table-cell>
          <table:table-cell xmlns:office="urn:oasis:names:tc:opendocument:xmlns:office:1.0" office:value-type="string" table:style-name="ce1">
            <text:p xmlns:text="urn:oasis:names:tc:opendocument:xmlns:text:1.0">2026-06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quarepoint Ops LLC</text:p>
          </table:table-cell>
          <table:table-cell xmlns:office="urn:oasis:names:tc:opendocument:xmlns:office:1.0" office:value-type="string" table:style-name="ce1">
            <text:p xmlns:text="urn:oasis:names:tc:opendocument:xmlns:text:1.0">Tobii AB</text:p>
          </table:table-cell>
          <table:table-cell xmlns:office="urn:oasis:names:tc:opendocument:xmlns:office:1.0" office:value-type="string" table:style-name="ce1">
            <text:p xmlns:text="urn:oasis:names:tc:opendocument:xmlns:text:1.0">SE000259142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Sigma Investments, LP</text:p>
          </table:table-cell>
          <table:table-cell xmlns:office="urn:oasis:names:tc:opendocument:xmlns:office:1.0" office:value-type="string" table:style-name="ce1">
            <text:p xmlns:text="urn:oasis:names:tc:opendocument:xmlns:text:1.0">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SE0000108656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6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Ilex Capital Partners (UK) LLP</text:p>
          </table:table-cell>
          <table:table-cell xmlns:office="urn:oasis:names:tc:opendocument:xmlns:office:1.0" office:value-type="string" table:style-name="ce1">
            <text:p xmlns:text="urn:oasis:names:tc:opendocument:xmlns:text:1.0">Aktiebolaget SKF</text:p>
          </table:table-cell>
          <table:table-cell xmlns:office="urn:oasis:names:tc:opendocument:xmlns:office:1.0" office:value-type="string" table:style-name="ce1">
            <text:p xmlns:text="urn:oasis:names:tc:opendocument:xmlns:text:1.0">SE000010822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6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KAMBI GROUP PLC</text:p>
          </table:table-cell>
          <table:table-cell xmlns:office="urn:oasis:names:tc:opendocument:xmlns:office:1.0" office:value-type="string" table:style-name="ce1">
            <text:p xmlns:text="urn:oasis:names:tc:opendocument:xmlns:text:1.0">MT0000780107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6-06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Karnov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32371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6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6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OssDsign AB</text:p>
          </table:table-cell>
          <table:table-cell xmlns:office="urn:oasis:names:tc:opendocument:xmlns:office:1.0" office:value-type="string" table:style-name="ce1">
            <text:p xmlns:text="urn:oasis:names:tc:opendocument:xmlns:text:1.0">SE0012570448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6-06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Coffee Stain Group AB</text:p>
          </table:table-cell>
          <table:table-cell xmlns:office="urn:oasis:names:tc:opendocument:xmlns:office:1.0" office:value-type="string" table:style-name="ce1">
            <text:p xmlns:text="urn:oasis:names:tc:opendocument:xmlns:text:1.0">SE0026599557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6-05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Financial Management In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5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6-05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ound Partners LLC</text:p>
          </table:table-cell>
          <table:table-cell xmlns:office="urn:oasis:names:tc:opendocument:xmlns:office:1.0" office:value-type="string" table:style-name="ce1">
            <text:p xmlns:text="urn:oasis:names:tc:opendocument:xmlns:text:1.0">AAK AB (publ)</text:p>
          </table:table-cell>
          <table:table-cell xmlns:office="urn:oasis:names:tc:opendocument:xmlns:office:1.0" office:value-type="string" table:style-name="ce1">
            <text:p xmlns:text="urn:oasis:names:tc:opendocument:xmlns:text:1.0">SE001133770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5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SE001783248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5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engcon AB</text:p>
          </table:table-cell>
          <table:table-cell xmlns:office="urn:oasis:names:tc:opendocument:xmlns:office:1.0" office:value-type="string" table:style-name="ce1">
            <text:p xmlns:text="urn:oasis:names:tc:opendocument:xmlns:text:1.0">SE0017769847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6-05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98">
            <text:p xmlns:text="urn:oasis:names:tc:opendocument:xmlns:text:1.0">0,98</text:p>
          </table:table-cell>
          <table:table-cell xmlns:office="urn:oasis:names:tc:opendocument:xmlns:office:1.0" office:value-type="string" table:style-name="ce1">
            <text:p xmlns:text="urn:oasis:names:tc:opendocument:xmlns:text:1.0">2026-05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Apotea AB (publ)</text:p>
          </table:table-cell>
          <table:table-cell xmlns:office="urn:oasis:names:tc:opendocument:xmlns:office:1.0" office:value-type="string" table:style-name="ce1">
            <text:p xmlns:text="urn:oasis:names:tc:opendocument:xmlns:text:1.0">SE0023313762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5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Verve Group SE</text:p>
          </table:table-cell>
          <table:table-cell xmlns:office="urn:oasis:names:tc:opendocument:xmlns:office:1.0" office:value-type="string" table:style-name="ce1">
            <text:p xmlns:text="urn:oasis:names:tc:opendocument:xmlns:text:1.0">SE001853806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5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1.44">
            <text:p xmlns:text="urn:oasis:names:tc:opendocument:xmlns:text:1.0">1,44</text:p>
          </table:table-cell>
          <table:table-cell xmlns:office="urn:oasis:names:tc:opendocument:xmlns:office:1.0" office:value-type="string" table:style-name="ce1">
            <text:p xmlns:text="urn:oasis:names:tc:opendocument:xmlns:text:1.0">2026-05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Röko AB (publ)</text:p>
          </table:table-cell>
          <table:table-cell xmlns:office="urn:oasis:names:tc:opendocument:xmlns:office:1.0" office:value-type="string" table:style-name="ce1">
            <text:p xmlns:text="urn:oasis:names:tc:opendocument:xmlns:text:1.0">SE0023950795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6-05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5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Hexag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1596190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5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Proact IT Group AB</text:p>
          </table:table-cell>
          <table:table-cell xmlns:office="urn:oasis:names:tc:opendocument:xmlns:office:1.0" office:value-type="string" table:style-name="ce1">
            <text:p xmlns:text="urn:oasis:names:tc:opendocument:xmlns:text:1.0">SE0015961222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6-05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3548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6-05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2162889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5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HL Partners L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5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6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MEKO AB</text:p>
          </table:table-cell>
          <table:table-cell xmlns:office="urn:oasis:names:tc:opendocument:xmlns:office:1.0" office:value-type="string" table:style-name="ce1">
            <text:p xmlns:text="urn:oasis:names:tc:opendocument:xmlns:text:1.0">SE000211006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5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park Investment Management LLC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6-05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chant MC Ltd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1.57">
            <text:p xmlns:text="urn:oasis:names:tc:opendocument:xmlns:text:1.0">1,57</text:p>
          </table:table-cell>
          <table:table-cell xmlns:office="urn:oasis:names:tc:opendocument:xmlns:office:1.0" office:value-type="string" table:style-name="ce1">
            <text:p xmlns:text="urn:oasis:names:tc:opendocument:xmlns:text:1.0">2026-05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2.69">
            <text:p xmlns:text="urn:oasis:names:tc:opendocument:xmlns:text:1.0">2,69</text:p>
          </table:table-cell>
          <table:table-cell xmlns:office="urn:oasis:names:tc:opendocument:xmlns:office:1.0" office:value-type="string" table:style-name="ce1">
            <text:p xmlns:text="urn:oasis:names:tc:opendocument:xmlns:text:1.0">2026-05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5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Lifco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20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5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Sedana Medic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88373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6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6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GES CAPITAL LLP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tena AB</text:p>
          </table:table-cell>
          <table:table-cell xmlns:office="urn:oasis:names:tc:opendocument:xmlns:office:1.0" office:value-type="string" table:style-name="ce1">
            <text:p xmlns:text="urn:oasis:names:tc:opendocument:xmlns:text:1.0">SE000166470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1.18">
            <text:p xmlns:text="urn:oasis:names:tc:opendocument:xmlns:text:1.0">1,18</text:p>
          </table:table-cell>
          <table:table-cell xmlns:office="urn:oasis:names:tc:opendocument:xmlns:office:1.0" office:value-type="string" table:style-name="ce1">
            <text:p xmlns:text="urn:oasis:names:tc:opendocument:xmlns:text:1.0">2026-04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AB Sagax</text:p>
          </table:table-cell>
          <table:table-cell xmlns:office="urn:oasis:names:tc:opendocument:xmlns:office:1.0" office:value-type="string" table:style-name="ce1">
            <text:p xmlns:text="urn:oasis:names:tc:opendocument:xmlns:text:1.0">SE000512781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inton Capital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6-04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Logistea AB</text:p>
          </table:table-cell>
          <table:table-cell xmlns:office="urn:oasis:names:tc:opendocument:xmlns:office:1.0" office:value-type="string" table:style-name="ce1">
            <text:p xmlns:text="urn:oasis:names:tc:opendocument:xmlns:text:1.0">SE0017131337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4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Dynavox Group AB</text:p>
          </table:table-cell>
          <table:table-cell xmlns:office="urn:oasis:names:tc:opendocument:xmlns:office:1.0" office:value-type="string" table:style-name="ce1">
            <text:p xmlns:text="urn:oasis:names:tc:opendocument:xmlns:text:1.0">SE001710562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4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veafastigheter AB (publ)</text:p>
          </table:table-cell>
          <table:table-cell xmlns:office="urn:oasis:names:tc:opendocument:xmlns:office:1.0" office:value-type="string" table:style-name="ce1">
            <text:p xmlns:text="urn:oasis:names:tc:opendocument:xmlns:text:1.0">SE0022243812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6-04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6-04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6-03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6-03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SE0000106270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3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6-03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inton Capital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6-03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inton Capital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6-03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illerud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0862997</text:p>
          </table:table-cell>
          <table:table-cell xmlns:office="urn:oasis:names:tc:opendocument:xmlns:office:1.0" office:value-type="float" table:style-name="ce1" office:value="1.42">
            <text:p xmlns:text="urn:oasis:names:tc:opendocument:xmlns:text:1.0">1,42</text:p>
          </table:table-cell>
          <table:table-cell xmlns:office="urn:oasis:names:tc:opendocument:xmlns:office:1.0" office:value-type="string" table:style-name="ce1">
            <text:p xmlns:text="urn:oasis:names:tc:opendocument:xmlns:text:1.0">2026-03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ooklands Fund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00950636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6-03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6-03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6-02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6-02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6-02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6-01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ALVOTECH</text:p>
          </table:table-cell>
          <table:table-cell xmlns:office="urn:oasis:names:tc:opendocument:xmlns:office:1.0" office:value-type="string" table:style-name="ce1">
            <text:p xmlns:text="urn:oasis:names:tc:opendocument:xmlns:text:1.0">SE0025011463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5-12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sta Partners UK LLP</text:p>
          </table:table-cell>
          <table:table-cell xmlns:office="urn:oasis:names:tc:opendocument:xmlns:office:1.0" office:value-type="string" table:style-name="ce1">
            <text:p xmlns:text="urn:oasis:names:tc:opendocument:xmlns:text:1.0">ALVOTECH</text:p>
          </table:table-cell>
          <table:table-cell xmlns:office="urn:oasis:names:tc:opendocument:xmlns:office:1.0" office:value-type="string" table:style-name="ce1">
            <text:p xmlns:text="urn:oasis:names:tc:opendocument:xmlns:text:1.0">SE0025011463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5-12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Origo Fonder AB</text:p>
          </table:table-cell>
          <table:table-cell xmlns:office="urn:oasis:names:tc:opendocument:xmlns:office:1.0" office:value-type="string" table:style-name="ce1">
            <text:p xmlns:text="urn:oasis:names:tc:opendocument:xmlns:text:1.0">Balco Group AB</text:p>
          </table:table-cell>
          <table:table-cell xmlns:office="urn:oasis:names:tc:opendocument:xmlns:office:1.0" office:value-type="string" table:style-name="ce1">
            <text:p xmlns:text="urn:oasis:names:tc:opendocument:xmlns:text:1.0">SE001032399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Origo Fonder AB</text:p>
          </table:table-cell>
          <table:table-cell xmlns:office="urn:oasis:names:tc:opendocument:xmlns:office:1.0" office:value-type="string" table:style-name="ce1">
            <text:p xmlns:text="urn:oasis:names:tc:opendocument:xmlns:text:1.0">Tobii AB</text:p>
          </table:table-cell>
          <table:table-cell xmlns:office="urn:oasis:names:tc:opendocument:xmlns:office:1.0" office:value-type="string" table:style-name="ce1">
            <text:p xmlns:text="urn:oasis:names:tc:opendocument:xmlns:text:1.0">SE0002591420</text:p>
          </table:table-cell>
          <table:table-cell xmlns:office="urn:oasis:names:tc:opendocument:xmlns:office:1.0" office:value-type="float" table:style-name="ce1" office:value="1.05">
            <text:p xmlns:text="urn:oasis:names:tc:opendocument:xmlns:text:1.0">1,05</text:p>
          </table:table-cell>
          <table:table-cell xmlns:office="urn:oasis:names:tc:opendocument:xmlns:office:1.0" office:value-type="string" table:style-name="ce1">
            <text:p xmlns:text="urn:oasis:names:tc:opendocument:xmlns:text:1.0">2025-11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1.16">
            <text:p xmlns:text="urn:oasis:names:tc:opendocument:xmlns:text:1.0">1,16</text:p>
          </table:table-cell>
          <table:table-cell xmlns:office="urn:oasis:names:tc:opendocument:xmlns:office:1.0" office:value-type="string" table:style-name="ce1">
            <text:p xmlns:text="urn:oasis:names:tc:opendocument:xmlns:text:1.0">2025-11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urgoCap Partners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5-10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DK0060952240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5-09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Wallenstam AB</text:p>
          </table:table-cell>
          <table:table-cell xmlns:office="urn:oasis:names:tc:opendocument:xmlns:office:1.0" office:value-type="string" table:style-name="ce1">
            <text:p xmlns:text="urn:oasis:names:tc:opendocument:xmlns:text:1.0">SE001778013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7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DK006095224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5-05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TATE OF WISCONSI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SSAB AB</text:p>
          </table:table-cell>
          <table:table-cell xmlns:office="urn:oasis:names:tc:opendocument:xmlns:office:1.0" office:value-type="string" table:style-name="ce1">
            <text:p xmlns:text="urn:oasis:names:tc:opendocument:xmlns:text:1.0">SE000012066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ubric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4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dward Adkins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07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TW Investments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2-04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LOMON CAPITAL LIMITED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2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II LLC</text:p>
          </table:table-cell>
          <table:table-cell xmlns:office="urn:oasis:names:tc:opendocument:xmlns:office:1.0" office:value-type="string" table:style-name="ce1">
            <text:p xmlns:text="urn:oasis:names:tc:opendocument:xmlns:text:1.0">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SE0003613090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19-12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nrik Törnvall</meta:initial-creator>
    <dc:creator>Fanny Sandberg</dc:creator>
    <meta:creation-date>2019-11-26T08:56:26Z</meta:creation-date>
    <dc:date>2022-11-16T09:54:34Z</dc:date>
  </office:meta>
</office:document-meta>
</file>